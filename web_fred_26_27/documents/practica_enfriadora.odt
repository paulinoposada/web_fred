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BB000000FA0394E38F7.jpg" manifest:media-type="image/jpeg"/>
  <manifest:file-entry manifest:full-path="Pictures/100000000000028A0000028AD7ADD7C0.png" manifest:media-type="image/png"/>
  <manifest:file-entry manifest:full-path="Pictures/1000000100000096000000435BF73389.png" manifest:media-type="image/png"/>
  <manifest:file-entry manifest:full-path="Pictures/100000000000030A000002396DDB62C8.png" manifest:media-type="image/png"/>
  <manifest:file-entry manifest:full-path="Pictures/10000000000000880000008845508CCF.jpg" manifest:media-type="image/jpeg"/>
  <manifest:file-entry manifest:full-path="Pictures/100000000000030600000052863D88E7.png" manifest:media-type="image/png"/>
  <manifest:file-entry manifest:full-path="Pictures/10000000000002E2000001823278FFBB.jpg" manifest:media-type="image/jpeg"/>
  <manifest:file-entry manifest:full-path="Pictures/10000000000002B900000208C02BA798.png" manifest:media-type="image/png"/>
  <manifest:file-entry manifest:full-path="Pictures/10000000000002C70000019E6C6E1F78.png" manifest:media-type="image/png"/>
  <manifest:file-entry manifest:full-path="Pictures/1000000000000263000001D3B3721612.png" manifest:media-type="image/png"/>
  <manifest:file-entry manifest:full-path="Pictures/10000000000002B20000009BD928E331.png" manifest:media-type="image/png"/>
  <manifest:file-entry manifest:full-path="Pictures/10000000000000B1000000BEB4AC76B6.jpg" manifest:media-type="image/jpeg"/>
  <manifest:file-entry manifest:full-path="Pictures/1000000000000088000000886E57FFE6.jpg" manifest:media-type="image/jpeg"/>
  <manifest:file-entry manifest:full-path="Pictures/10000000000000AB0000009F9C9F0B2C.jpg" manifest:media-type="image/jpeg"/>
  <manifest:file-entry manifest:full-path="Pictures/100000000000008800000088EA5BFAD5.jpg" manifest:media-type="image/jpeg"/>
  <manifest:file-entry manifest:full-path="Pictures/10000000000000A30000007E8E84551B.jpg" manifest:media-type="image/jpeg"/>
  <manifest:file-entry manifest:full-path="Pictures/10000000000004620000034959C1E1C2.jpg" manifest:media-type="image/jpeg"/>
  <manifest:file-entry manifest:full-path="Pictures/10000000000000880000008873DE6DD7.jpg" manifest:media-type="image/jpeg"/>
  <manifest:file-entry manifest:full-path="Pictures/1000000000000088000000880419C16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font-weight="normal" officeooo:rsid="00075817" officeooo:paragraph-rsid="001885d6" style:font-weight-asian="normal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fo:font-weight="normal" officeooo:rsid="000a623f" officeooo:paragraph-rsid="001885d6" style:font-weight-asian="normal" style:font-weight-complex="normal"/>
    </style:style>
    <style:style style:name="P3" style:family="paragraph" style:parent-style-name="Standard">
      <style:paragraph-properties fo:line-height="150%" fo:text-align="start" style:justify-single-word="false" fo:break-before="page"/>
      <style:text-properties fo:font-weight="normal" officeooo:rsid="000a623f" officeooo:paragraph-rsid="001885d6" style:font-weight-asian="normal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font-weight="normal" officeooo:rsid="001e7043" officeooo:paragraph-rsid="001e7043" style:font-weight-asian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weight="normal" officeooo:rsid="001e7043" officeooo:paragraph-rsid="001f5300" style:font-weight-asian="normal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font-weight="normal" officeooo:rsid="0021fc84" officeooo:paragraph-rsid="0021fc84" style:font-weight-asian="normal" style:font-weight-complex="normal"/>
    </style:style>
    <style:style style:name="P7" style:family="paragraph" style:parent-style-name="Standard">
      <style:paragraph-properties fo:line-height="150%" fo:text-align="start" style:justify-single-word="false" fo:break-before="page"/>
      <style:text-properties fo:font-weight="normal" officeooo:rsid="0021fc84" officeooo:paragraph-rsid="0021fc84" style:font-weight-asian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fo:font-weight="normal" officeooo:rsid="0024c6e7" officeooo:paragraph-rsid="0024c6e7" style:font-weight-asian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font-weight="normal" officeooo:rsid="00281938" officeooo:paragraph-rsid="00281938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75817" officeooo:paragraph-rsid="001885d6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75817" officeooo:paragraph-rsid="001885d6" style:font-weight-asian="bold" style:font-weight-complex="bold"/>
    </style:style>
    <style:style style:name="P12" style:family="paragraph" style:parent-style-name="Standard">
      <style:paragraph-properties fo:line-height="150%" fo:text-align="start" style:justify-single-word="false" fo:break-before="page"/>
      <style:text-properties fo:font-weight="bold" officeooo:rsid="001e7043" officeooo:paragraph-rsid="001e7043" style:font-weight-asian="bold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fo:font-weight="bold" officeooo:rsid="0024c6e7" officeooo:paragraph-rsid="0024c6e7" style:font-weight-asian="bold" style:font-weight-complex="bold"/>
    </style:style>
    <style:style style:name="P14" style:family="paragraph" style:parent-style-name="Standard">
      <style:paragraph-properties fo:line-height="150%" fo:text-align="start" style:justify-single-word="false"/>
      <style:text-properties fo:font-size="12pt" fo:font-weight="normal" officeooo:rsid="00129652" officeooo:paragraph-rsid="001885d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line-height="150%" fo:text-align="start" style:justify-single-word="false" fo:break-before="page"/>
      <style:text-properties fo:font-size="12pt" fo:font-weight="normal" officeooo:rsid="00129652" officeooo:paragraph-rsid="001885d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fo:font-size="12pt" fo:font-weight="normal" officeooo:rsid="000a623f" officeooo:paragraph-rsid="001885d6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fo:font-size="12pt" fo:font-weight="normal" officeooo:rsid="000a623f" officeooo:paragraph-rsid="001885d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50%" fo:text-align="start" style:justify-single-word="false" fo:break-before="page"/>
      <style:text-properties fo:font-size="12pt" fo:font-weight="normal" officeooo:rsid="00162f9d" officeooo:paragraph-rsid="001885d6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fo:font-size="12pt" fo:font-weight="normal" officeooo:rsid="00162f9d" officeooo:paragraph-rsid="001885d6" style:font-size-asian="12pt" style:font-weight-asian="normal" style:font-size-complex="12pt" style:font-weight-complex="normal"/>
    </style:style>
    <style:style style:name="P20" style:family="paragraph" style:parent-style-name="Standard" style:master-page-name="Landscape">
      <style:paragraph-properties fo:line-height="150%" fo:text-align="start" style:justify-single-word="false" style:page-number="auto"/>
      <style:text-properties fo:font-weight="normal" officeooo:rsid="000a623f" officeooo:paragraph-rsid="001885d6" style:font-weight-asian="normal" style:font-weight-complex="normal"/>
    </style:style>
    <style:style style:name="P21" style:family="paragraph" style:parent-style-name="Standard" style:master-page-name="Standard">
      <style:paragraph-properties fo:line-height="150%" fo:text-align="start" style:justify-single-word="false" style:page-number="auto"/>
      <style:text-properties fo:font-weight="normal" officeooo:rsid="000a623f" officeooo:paragraph-rsid="001885d6" style:font-weight-asian="normal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fo:font-size="12pt" fo:font-weight="normal" officeooo:rsid="002bf2c9" officeooo:paragraph-rsid="002bf2c9" style:font-size-asian="12pt" style:font-weight-asian="normal" style:font-size-complex="12pt" style:font-weight-complex="normal"/>
    </style:style>
    <style:style style:name="P23" style:family="paragraph">
      <loext:graphic-properties draw:fill="none" draw:fill-color="#729fc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in" fo:margin-right="0in" fo:margin-top="0in" fo:margin-bottom="0in" fo:line-height="100%" fo:text-align="start" fo:text-indent="0in" style:writing-mode="lr-tb"/>
    </style:style>
    <style:style style:name="P25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729fc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in" fo:margin-right="0in" fo:margin-top="0in" fo:margin-bottom="0in" fo:line-height="100%" fo:text-indent="0in"/>
    </style:style>
    <style:style style:name="P32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/>
    </style:style>
    <style:style style:name="T1" style:family="text">
      <style:text-properties officeooo:rsid="0008e8a4"/>
    </style:style>
    <style:style style:name="T2" style:family="text">
      <style:text-properties officeooo:rsid="000d1725"/>
    </style:style>
    <style:style style:name="T3" style:family="text">
      <style:text-properties officeooo:rsid="001772df"/>
    </style:style>
    <style:style style:name="T4" style:family="text">
      <style:text-properties officeooo:rsid="00129652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0d1725" style:font-size-asian="8pt" style:font-size-complex="8pt"/>
    </style:style>
    <style:style style:name="T7" style:family="text">
      <style:text-properties fo:font-size="8pt" officeooo:rsid="000f1064" style:font-size-asian="8pt" style:font-size-complex="8pt"/>
    </style:style>
    <style:style style:name="T8" style:family="text">
      <style:text-properties fo:font-size="8pt" officeooo:rsid="001bd277" style:font-size-asian="8pt" style:font-size-complex="8pt"/>
    </style:style>
    <style:style style:name="T9" style:family="text">
      <style:text-properties officeooo:rsid="000f1064"/>
    </style:style>
    <style:style style:name="T10" style:family="text">
      <style:text-properties officeooo:rsid="0010e4ed"/>
    </style:style>
    <style:style style:name="T11" style:family="text">
      <style:text-properties officeooo:rsid="001a42d7"/>
    </style:style>
    <style:style style:name="T12" style:family="text">
      <style:text-properties officeooo:rsid="0013c630"/>
    </style:style>
    <style:style style:name="T13" style:family="text">
      <style:text-properties officeooo:rsid="0013c75e"/>
    </style:style>
    <style:style style:name="T14" style:family="text">
      <style:text-properties officeooo:rsid="0014f9ed"/>
    </style:style>
    <style:style style:name="T15" style:family="text">
      <style:text-properties officeooo:rsid="00162f9d"/>
    </style:style>
    <style:style style:name="T16" style:family="text">
      <style:text-properties officeooo:rsid="001885d6"/>
    </style:style>
    <style:style style:name="T17" style:family="text">
      <style:text-properties fo:font-size="12pt" officeooo:rsid="000d1725" style:font-size-asian="10.5pt" style:font-size-complex="12pt"/>
    </style:style>
    <style:style style:name="T18" style:family="text">
      <style:text-properties officeooo:rsid="001f5300"/>
    </style:style>
    <style:style style:name="T19" style:family="text">
      <style:text-properties officeooo:rsid="002dd6e3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Liberation Sans" style:font-size-asian="14pt" style:font-style-asian="normal" style:font-weight-asian="normal" style:font-name-complex="Liberation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in" fo:min-width="0in" fo:padding-top="0in" fo:padding-bottom="0in" fo:padding-left="0in" fo:padding-right="0in" fo:wrap-option="wrap" draw:shadow="hidden" draw:shadow-offset-x="0.0783in" draw:shadow-offset-y="0.0783in" draw:shadow-color="#808080" style:mirror="none" loext:decorative="false" style:run-through="foreground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252in" fo:min-width="1.3445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252in" fo:min-width="5.428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252in" fo:min-width="3.011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252in" fo:min-width="5.6154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252in" fo:min-width="1.3028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252in" fo:min-width="1.7925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252in" fo:min-width="5.6984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252in" fo:min-width="3.0008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448in" fo:min-width="5.2925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244in" fo:min-width="1.511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252in" fo:min-width="5.928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252in" fo:min-width="1.3654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89in" fo:min-width="0.25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252in" fo:min-width="5.8445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244in" fo:min-width="2.7925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252in" fo:min-width="2.7299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/>
    </style:style>
    <style:style style:name="gr2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2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stroke-linejoin="round" svg:stroke-linecap="butt" draw:fill="solid" draw:fill-color="#729fcf" draw:textarea-horizontal-align="justify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22" style:family="graphic">
      <style:graphic-properties draw:stroke="solid" svg:stroke-width="0.039in" svg:stroke-color="#000000" draw:marker-start="" draw:marker-start-width="0.0783in" draw:marker-start-center="false" draw:marker-end="" draw:marker-end-width="0.0783in" draw:marker-end-center="false" draw:stroke-linejoin="round" svg:stroke-linecap="butt" draw:fill="none" draw:fill-color="#729fcf" draw:textarea-horizontal-align="justify" fo:padding-top="0.0193in" fo:padding-bottom="0.0193in" fo:padding-left="0.0193in" fo:padding-right="0.0193in" fo:wrap-option="wrap" draw:shadow="hidden" draw:shadow-offset-x="0.0783in" draw:shadow-offset-y="0.0783in" draw:shadow-color="#808080" loext:decorative="false" style:run-through="foreground"/>
    </style:style>
    <style:style style:name="gr2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000000" draw:textarea-horizontal-align="justify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2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stroke-linejoin="round" svg:stroke-linecap="butt" draw:fill="none" draw:fill-color="#729fcf" draw:textarea-horizontal-align="justify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2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stroke-linejoin="round" svg:stroke-linecap="butt" draw:fill="solid" draw:fill-color="#000000" draw:textarea-horizontal-align="justify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2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882in" fo:min-width="0.7236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807in" fo:min-width="0.8071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244in" fo:min-width="1.6681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252in" fo:min-width="1.4902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3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244in" fo:min-width="0.6047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3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244in" fo:min-width="1.6472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3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244in" fo:min-width="1.4173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3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252in" fo:min-width="1.6264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34" style:family="graphic">
      <style:graphic-properties draw:stroke="solid" svg:stroke-width="0.039in" svg:stroke-color="#ff0000" draw:marker-start="" draw:marker-start-width="0.0783in" draw:marker-start-center="false" draw:marker-end="" draw:marker-end-width="0.0783in" draw:marker-end-center="false" draw:stroke-linejoin="round" svg:stroke-linecap="butt" draw:fill="none" draw:fill-color="#729fcf" draw:textarea-horizontal-align="justify" fo:padding-top="0.0193in" fo:padding-bottom="0.0193in" fo:padding-left="0.0193in" fo:padding-right="0.0193in" fo:wrap-option="wrap" draw:shadow="hidden" draw:shadow-offset-x="0.0783in" draw:shadow-offset-y="0.0783in" draw:shadow-color="#808080" loext:decorative="false" style:run-through="foreground"/>
    </style:style>
    <style:style style:name="gr3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252in" fo:min-width="1.511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3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252in" fo:min-width="0.8339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37" style:family="graphic">
      <style:graphic-properties draw:stroke="solid" svg:stroke-width="0.039in" svg:stroke-color="#ffbf00" draw:marker-start="" draw:marker-start-width="0.0783in" draw:marker-start-center="false" draw:marker-end="" draw:marker-end-width="0.0783in" draw:marker-end-center="false" draw:stroke-linejoin="round" svg:stroke-linecap="butt" draw:fill="none" draw:fill-color="#729fcf" draw:textarea-horizontal-align="justify" fo:padding-top="0.0193in" fo:padding-bottom="0.0193in" fo:padding-left="0.0193in" fo:padding-right="0.0193in" fo:wrap-option="wrap" draw:shadow="hidden" draw:shadow-offset-x="0.0783in" draw:shadow-offset-y="0.0783in" draw:shadow-color="#808080" loext:decorative="false" style:run-through="foreground"/>
    </style:style>
    <style:style style:name="gr3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252in" fo:min-width="0.3693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3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252in" fo:min-width="0.3701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40" style:family="graphic">
      <style:graphic-properties draw:stroke="solid" svg:stroke-width="0.039in" svg:stroke-color="#b4c7dc" draw:marker-start="" draw:marker-start-width="0.0783in" draw:marker-start-center="false" draw:marker-end="" draw:marker-end-width="0.0783in" draw:marker-end-center="false" draw:stroke-linejoin="round" svg:stroke-linecap="butt" draw:fill="none" draw:fill-color="#729fcf" draw:textarea-horizontal-align="justify" fo:padding-top="0.0193in" fo:padding-bottom="0.0193in" fo:padding-left="0.0193in" fo:padding-right="0.0193in" fo:wrap-option="wrap" draw:shadow="hidden" draw:shadow-offset-x="0.0783in" draw:shadow-offset-y="0.0783in" draw:shadow-color="#808080" loext:decorative="false" style:run-through="foreground"/>
    </style:style>
    <style:style style:name="gr41" style:family="graphic">
      <style:graphic-properties draw:stroke="solid" svg:stroke-width="0.039in" svg:stroke-color="#729fcf" draw:marker-start="" draw:marker-start-width="0.0783in" draw:marker-start-center="false" draw:marker-end="" draw:marker-end-width="0.0783in" draw:marker-end-center="false" draw:stroke-linejoin="round" svg:stroke-linecap="butt" draw:fill="none" draw:fill-color="#729fcf" draw:textarea-horizontal-align="justify" fo:padding-top="0.0193in" fo:padding-bottom="0.0193in" fo:padding-left="0.0193in" fo:padding-right="0.0193in" fo:wrap-option="wrap" draw:shadow="hidden" draw:shadow-offset-x="0.0783in" draw:shadow-offset-y="0.0783in" draw:shadow-color="#808080" loext:decorative="false" style:run-through="foreground"/>
    </style:style>
    <style:style style:name="gr4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252in" fo:min-width="0.3583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4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89in" fo:min-width="0.5992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4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252in" fo:min-width="0.7307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4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252in" fo:min-width="1.8965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4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252in" fo:min-width="1.1882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4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252in" fo:min-width="1.1256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48" style:family="graphic">
      <style:graphic-properties draw:stroke="dash" draw:stroke-dash="stroke-dash26" svg:stroke-width="0in" svg:stroke-color="#000000" draw:marker-start="" draw:marker-start-width="0.0783in" draw:marker-start-center="false" draw:marker-end="" draw:marker-end-width="0.0783in" draw:marker-end-center="false" draw:stroke-linejoin="round" svg:stroke-linecap="butt" draw:fill="none" draw:fill-color="#729fcf" draw:textarea-horizontal-align="justify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4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252in" fo:min-width="0.678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5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244in" fo:min-width="0.9598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5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252in" fo:min-width="0.6362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5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auto-grow-height="true" draw:auto-grow-width="false" fo:min-height="0.1602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5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auto-grow-height="true" draw:auto-grow-width="false" fo:min-height="0.2146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5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auto-grow-height="true" draw:auto-grow-width="false" fo:min-height="0.3102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5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5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áctica enfriadora</text:p>
      <text:p text:style-name="P11"/>
      <text:p text:style-name="P1">Esta práctica consiste en poner en marcha una instalación con una enfriadora de agua (chiller). Estos equipos se utilizan frecuentemente para la climatización de embarcaciones.</text:p>
      <text:p text:style-name="P1"/>
      <text:p text:style-name="P1">En el modo de funcionamiento de frío, el evaporador enfría el agua de un circuito cerrado que recorre las e<text:span text:style-name="T1">s</text:span>tancias a climatizar. En cada estancia se encuentra un intercambiador de calor con un ventilador que fuerza el paso de aire (<text:a xlink:type="simple" xlink:href="https://es.wikipedia.org/wiki/Ventiloconvector" text:style-name="Internet_20_link" text:visited-style-name="Visited_20_Internet_20_Link"><text:span text:style-name="T2">ventiloconvector, </text:span>fancoil</text:a>). <text:span text:style-name="T1">El agua circula por el circuito de fancoils impulsad</text:span><text:span text:style-name="T3">o</text:span><text:span text:style-name="T1"> por una bomba de circulación. </text:span><text:span text:style-name="T4">En los fancoils, el agua que circula a través de el</text:span><text:span text:style-name="T3">l</text:span><text:span text:style-name="T4">os, absorbe calor.</text:span></text:p>
      <text:p text:style-name="P1"/>
      <text:p text:style-name="P2"><draw:frame draw:style-name="fr1" draw:name="Image1 Copy 1" text:anchor-type="char" svg:width="6.6929in" svg:height="4.8945in" draw:z-index="1"><draw:image xlink:href="Pictures/100000000000030A000002396DDB62C8.png" xlink:type="simple" xlink:show="embed" xlink:actuate="onLoad" draw:mime-type="image/png"/></draw:frame><draw:frame draw:style-name="fr1" draw:name="Image1" text:anchor-type="char" svg:width="6.6929in" svg:height="4.8945in" draw:z-index="0"><draw:image xlink:href="Pictures/100000000000030A000002396DDB62C8.png" xlink:type="simple" xlink:show="embed" xlink:actuate="onLoad" draw:mime-type="image/png"/></draw:frame><text:span text:style-name="T9">Imagen 1: </text:span><text:span text:style-name="T10">Sistema de climatización mediante enfriadora</text:span><text:span text:style-name="T9"> <text:s/></text:span><text:a xlink:type="simple" xlink:href="https://paulinoposada.github.io/web_fred/web_fred_26_27/documents/webasto_catalogue.pdf" text:style-name="Internet_20_link" text:visited-style-name="Visited_20_Internet_20_Link"><text:span text:style-name="T5">WEBASTO Marin</text:span><text:span text:style-name="T6">e</text:span><text:span text:style-name="T5"> Catalog 25/26</text:span></text:a><text:span text:style-name="T5">, p. 51</text:span></text:p>
      <text:p text:style-name="P2"><text:span text:style-name="T5"/></text:p>
      <text:p text:style-name="P16"><draw:frame draw:style-name="fr4" draw:name="Image5" text:anchor-type="char" svg:x="0in" svg:y="0.05in" svg:width="6.6929in" svg:height="0.7091in" draw:z-index="7"><draw:image xlink:href="Pictures/100000000000030600000052863D88E7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3"><draw:frame draw:style-name="fr4" draw:name="Image2" text:anchor-type="char" svg:x="0in" svg:y="0.1398in" svg:width="6.6929in" svg:height="4.9929in" draw:z-index="2"><draw:image xlink:href="Pictures/10000000000002B900000208C02BA79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9">Imagen 2: </text:span><text:span text:style-name="T10">Fancoil</text:span><text:span text:style-name="T9"> </text:span><text:a xlink:type="simple" xlink:href="https://paulinoposada.github.io/web_fred/web_fred_26_27/documents/webasto_catalogue.pdf" text:style-name="Internet_20_link" text:visited-style-name="Visited_20_Internet_20_Link"><text:span text:style-name="T5">WEBASTO Marin</text:span><text:span text:style-name="T6">e</text:span><text:span text:style-name="T5"> Catalog 25/26</text:span></text:a><text:span text:style-name="T5">, p. </text:span><text:span text:style-name="T6">63</text:span></text:p>
      <text:p text:style-name="P2"><text:span text:style-name="T17"/></text:p>
      <text:p text:style-name="P2"><text:span text:style-name="T17"/></text:p>
      <text:p text:style-name="P2"><draw:frame draw:style-name="fr3" draw:name="Image6" text:anchor-type="char" svg:x="-0.2626in" svg:y="0in" svg:width="6.6929in" svg:height="1.5035in" draw:z-index="8"><draw:image xlink:href="Pictures/10000000000002B20000009BD928E331.png" xlink:type="simple" xlink:show="embed" xlink:actuate="onLoad" draw:mime-type="image/png"/></draw:frame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6"/></text:p>
      <text:p text:style-name="P15">La enfriadora de agua se encuentra en la sala de máquinas. El calor absorbido en los fancoils es transportad<text:span text:style-name="T11">o</text:span> por el circuito de agua al evaporador de la enfriadora. La enfriadora cede el calor recibido de los fancoils al agua de mar que circula por un intercambiador co<text:span text:style-name="T12">axial</text:span>, que funciona como condensador.</text:p>
      <text:p text:style-name="P14"><text:span text:style-name="T6"/></text:p>
      <text:p text:style-name="P14"><text:span text:style-name="T6"/></text:p>
      <text:p text:style-name="P14"><draw:frame draw:style-name="fr1" draw:name="Image3" text:anchor-type="char" svg:width="6.3646in" svg:height="4.8646in" draw:z-index="4"><draw:image xlink:href="Pictures/1000000000000263000001D3B3721612.png" xlink:type="simple" xlink:show="embed" xlink:actuate="onLoad" draw:mime-type="image/png"/></draw:frame></text:p>
      <text:p text:style-name="P2"><text:span text:style-name="T9">Imagen </text:span><text:span text:style-name="T13">3</text:span><text:span text:style-name="T9">: </text:span><text:span text:style-name="T13">Enfriadora WEBASTO Blue</text:span><text:span text:style-name="T14">C</text:span><text:span text:style-name="T13">ool </text:span><text:span text:style-name="T14">C- series</text:span><text:span text:style-name="T9"> </text:span></text:p>
      <text:p text:style-name="P2"><text:a xlink:type="simple" xlink:href="https://paulinoposada.github.io/web_fred/web_fred_26_27/documents/5001375B.pdf" text:style-name="Internet_20_link" text:visited-style-name="Visited_20_Internet_20_Link"><text:span text:style-name="T7">Webasto BlueCool Premium (WBCP) Series</text:span><text:span text:style-name="T5"> - Operation And Installation Instructions</text:span></text:a><text:span text:style-name="T5">, p. </text:span><text:span text:style-name="T8">1</text:span></text:p>
      <text:p text:style-name="P17"/>
      <text:p text:style-name="P17"/>
      <text:p text:style-name="P22"><text:a xlink:type="simple" xlink:href="https://en.wikipedia.org/wiki/Cupronickel" text:style-name="Internet_20_link" text:visited-style-name="Visited_20_Internet_20_Link">Cupro-nickel</text:a></text:p>
      <text:p text:style-name="P17"/>
      <text:p text:style-name="P17"/>
      <text:p text:style-name="P17"/>
      <text:p text:style-name="P18">En el taller de frío se encuentra una enfriadora WEBASTO, modelo <text:span text:style-name="T16">HCS50D – TWIN/LG ROT</text:span>.</text:p>
      <text:p text:style-name="P19"/>
      <text:p text:style-name="P2"><draw:frame draw:style-name="fr2" draw:name="Image4" text:anchor-type="char" svg:width="6.6929in" svg:height="3.5008in" draw:z-index="3"><draw:image xlink:href="Pictures/10000000000002E2000001823278FFBB.jpg" xlink:type="simple" xlink:show="embed" xlink:actuate="onLoad" draw:mime-type="image/jpeg"/></draw:frame><text:span text:style-name="T9">Imagen </text:span><text:span text:style-name="T15">4</text:span><text:span text:style-name="T9">: </text:span><text:span text:style-name="T15">Etiqueta de datos de la enfriadora del taller</text:span></text:p>
      <text:p text:style-name="P2"/>
      <text:p text:style-name="P3"><draw:frame text:anchor-type="paragraph" draw:z-index="5" draw:name="Image 1" draw:style-name="gr56" draw:text-style-name="P33" svg:width="7.4795in" svg:height="5.6094in" svg:x="-0.4602in" svg:y="0.1882in"><draw:image xlink:href="Pictures/10000000000004620000034959C1E1C2.jpg" xlink:type="simple" xlink:show="embed" xlink:actuate="onLoad" draw:mime-type="image/jpeg"><text:p/></draw:image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12">Medición de temperaturas</text:p>
      <text:p text:style-name="P4"/>
      <text:p text:style-name="P4">Se utilizan 6 sondas de temperatura <text:s/>tipo <text:a xlink:type="simple" xlink:href="https://paulinoposada.github.io/web/websites/paulino/miscellaneous/arduino/DS18B20_temperature_sensor_tutorial.pdf" text:style-name="Internet_20_link" text:visited-style-name="Visited_20_Internet_20_Link">DS18B20</text:a> para medir la temperatura en los siguientes puntos:</text:p>
      <text:p text:style-name="P4"/>
      <text:p text:style-name="P4"><text:span text:style-name="T18">Punto 1 - </text:span>Temperatura de descarga</text:p>
      <text:p text:style-name="P4">La sonda se encuentra sujeta a la tubería de descarga y cubierta con un aislante para asegurar una lectura de temperatura lo más exacta posible.</text:p>
      <text:p text:style-name="P4"/>
      <text:p text:style-name="P5"><text:span text:style-name="T18">Punto 2 - </text:span>Temperatura del agua que sale del evaporador</text:p>
      <text:p text:style-name="P4">La sonda está introducida en una vaina de inmersión. La vaina de inmersión de ½” está roscada en una T de polietileno de 25 mm de diámetro.</text:p>
      <text:p text:style-name="P4"><text:s/></text:p>
      <text:p text:style-name="P5"><text:span text:style-name="T18">Punto 3 - </text:span>Temperatura del agua que entra en el evaporador</text:p>
      <text:p text:style-name="P4">Colocación de la sonda igual que en el punto de medición <text:span text:style-name="T18">2</text:span>.</text:p>
      <text:p text:style-name="P4"/>
      <text:p text:style-name="P5"><text:span text:style-name="T18">Punto 4 - </text:span>Temperatura del agua <text:span text:style-name="T18">antes de la bomba de circulación del agua de piscina (condensador)</text:span></text:p>
      <text:p text:style-name="P5">Colocación de la sonda igual que en el punto de medición <text:span text:style-name="T18">2</text:span>.</text:p>
      <text:p text:style-name="P5"/>
      <text:p text:style-name="P5"><text:span text:style-name="T18">Punto 5 - </text:span>Temperatura del agua <text:span text:style-name="T18">después de la bomba de circulación del agua de piscina </text:span><text:span text:style-name="T19">a la etrada del condensador</text:span></text:p>
      <text:p text:style-name="P5">Colocación de la sonda igual que en el punto de medición <text:span text:style-name="T18">2</text:span>.</text:p>
      <text:p text:style-name="P5"/>
      <text:p text:style-name="P5"><text:span text:style-name="T18">Punto 6 - </text:span>Temperatura del agua <text:span text:style-name="T18">a la salida del condensador</text:span></text:p>
      <text:p text:style-name="P5">Colocación de la sonda igual que en el punto de medición <text:span text:style-name="T18">2</text:span>.</text:p>
      <text:p text:style-name="P5"/>
      <text:p text:style-name="P5"/>
      <text:p text:style-name="P6">Atención, el rango de funcionamiento del sensor DS18B20 es de -10 ºC a +85 ºC.</text:p>
      <text:p text:style-name="P6"/>
      <text:p text:style-name="P6"/>
      <text:p text:style-name="P7"/>
      <text:p text:style-name="P13">Vídeos explicativos</text:p>
      <text:p text:style-name="P8"/>
      <text:p text:style-name="P8"><text:a xlink:type="simple" xlink:href="https://youtu.be/F7F0gf-q5sc" text:style-name="Internet_20_link" text:visited-style-name="Visited_20_Internet_20_Link">Enfriadora 1</text:a></text:p>
      <text:p text:style-name="P3"><draw:g text:anchor-type="paragraph" draw:z-index="9" draw:name="Group object 2" draw:style-name="gr1"><draw:polygon draw:style-name="gr20" draw:text-style-name="P28" svg:width="8.2669in" svg:height="11.6925in" svg:x="0.0008in" svg:y="0in" svg:viewBox="0 0 20999 29700" draw:points="0,0 20999,0 20999,29700 0,29700"><text:p/></draw:polygon><draw:polygon draw:style-name="gr21" draw:text-style-name="P29" svg:width="0.7878in" svg:height="0.8272in" svg:x="3.5039in" svg:y="4.1339in" svg:viewBox="0 0 2002 2102" draw:points="1003,2102 0,2102 0,0 2002,0 2002,2102"><text:p/></draw:polygon><draw:line draw:style-name="gr22" draw:text-style-name="P23" svg:x1="3.7016in" svg:y1="3.3866in" svg:x2="3.7016in" svg:y2="4.1346in"><text:p/></draw:line><draw:line draw:style-name="gr22" draw:text-style-name="P23" svg:x1="4.0949in" svg:y1="3.8193in" svg:x2="4.0949in" svg:y2="4.1343in"><text:p/></draw:line><draw:line draw:style-name="gr22" draw:text-style-name="P23" svg:x1="4.0949in" svg:y1="4.9606in" svg:x2="4.0949in" svg:y2="5.2756in"><text:p/></draw:line><draw:line draw:style-name="gr22" draw:text-style-name="P23" svg:x1="3.6858in" svg:y1="5.322in" svg:x2="3.702in" svg:y2="6.6154in"><text:p/></draw:line><draw:polygon draw:style-name="gr23" draw:text-style-name="P30" svg:width="0.1969in" svg:height="0.2969in" svg:x="3.5874in" svg:y="5.0402in" svg:viewBox="0 0 501 755" draw:points="243,0 0,755 501,749"><text:p/></draw:polygon><draw:frame draw:style-name="gr2" draw:text-style-name="P23" svg:width="1.1413in" svg:height="1.0622in" svg:x="3.111in" svg:y="6.6134in"><draw:image xlink:href="Pictures/10000000000000AB0000009F9C9F0B2C.jpg" xlink:type="simple" xlink:show="embed" xlink:actuate="onLoad" draw:mime-type="image/jpeg"><text:p/></draw:image></draw:frame><draw:polygon draw:style-name="gr21" draw:text-style-name="P29" svg:width="3.1106in" svg:height="0.5913in" svg:x="4.3319in" svg:y="10.7087in" svg:viewBox="0 0 7902 1503" draw:points="0,0 7902,0 5927,1503 1976,1503"><text:p/></draw:polygon><draw:line draw:style-name="gr22" draw:text-style-name="P23" svg:x1="5.1972in" svg:y1="10.7874in" svg:x2="5.1972in" svg:y2="9.8819in"><text:p/></draw:line><draw:line draw:style-name="gr22" draw:text-style-name="P23" svg:x1="4.2528in" svg:y1="10.1575in" svg:x2="5.1583in" svg:y2="10.1575in"><text:p/></draw:line><draw:polygon draw:style-name="gr24" draw:text-style-name="P23" svg:width="0.165in" svg:height="0.1976in" svg:x="5.1189in" svg:y="9.685in" svg:viewBox="0 0 420 503" draw:points="211,0 420,503 0,503"><text:p/></draw:polygon><draw:polygon draw:style-name="gr24" draw:text-style-name="P23" svg:width="0.1657in" svg:height="0.1976in" svg:x="5.1189in" svg:y="9.4882in" svg:viewBox="0 0 422 503" draw:points="210,503 0,0 422,0"><text:p/></draw:polygon><draw:polygon draw:style-name="gr24" draw:text-style-name="P23" svg:width="0.1657in" svg:height="0.1976in" svg:x="5.1189in" svg:y="10.9846in" svg:viewBox="0 0 422 503" draw:points="210,0 422,503 0,503"><text:p/></draw:polygon><draw:polygon draw:style-name="gr24" draw:text-style-name="P23" svg:width="0.165in" svg:height="0.1976in" svg:x="5.1201in" svg:y="10.7878in" svg:viewBox="0 0 420 503" draw:points="210,503 0,0 420,0"><text:p/></draw:polygon><draw:path draw:style-name="gr25" draw:text-style-name="P30" svg:width="0.0783in" svg:height="0.0787in" svg:x="5.2374in" svg:y="11.1417in" svg:viewBox="0 0 200 201" svg:d="M98 0c59 0 102 43 102 101 0 56-43 100-102 100-55 0-98-44-98-100 0-58 43-101 98-101z"><text:p/></draw:path><draw:line draw:style-name="gr22" draw:text-style-name="P23" svg:x1="6.361in" svg:y1="10.3583in" svg:x2="6.3799in" svg:y2="5.2756in"><text:p/></draw:line><draw:polygon draw:style-name="gr23" draw:text-style-name="P30" svg:width="0.1969in" svg:height="0.2961in" svg:x="6.2618in" svg:y="10.3441in" svg:viewBox="0 0 501 753" draw:points="248,753 501,2 0,0"><text:p/></draw:polygon><draw:line draw:style-name="gr22" draw:text-style-name="P23" svg:x1="6.3795in" svg:y1="5.2764in" svg:x2="4.0949in" svg:y2="5.2551in"><text:p/></draw:line><draw:frame draw:style-name="gr26" draw:text-style-name="P26" svg:width="0.724in" svg:height="0.2886in" svg:x="3.537in" svg:y="4.4083in"><draw:text-box><text:p text:style-name="P24"><text:span text:style-name="T21">WBCL</text:span></text:p></draw:text-box></draw:frame><draw:frame draw:style-name="gr27" draw:text-style-name="P25" svg:width="0.8071in" svg:height="0.2807in" svg:x="5.4854in" svg:y="10.8638in"><draw:text-box><text:p text:style-name="P24"><text:span text:style-name="T20">Piscina</text:span></text:p></draw:text-box></draw:frame><draw:frame draw:style-name="gr28" draw:text-style-name="P25" svg:width="1.6685in" svg:height="0.2248in" svg:x="4.3508in" svg:y="8.9484in"><draw:text-box><text:p text:style-name="P24"><text:span text:style-name="T20">Válvula de llenado </text:span></text:p></draw:text-box></draw:frame><draw:frame draw:style-name="gr29" draw:text-style-name="P25" svg:width="1.4906in" svg:height="0.2252in" svg:x="4.3508in" svg:y="9.1665in"><draw:text-box><text:p text:style-name="P24"><text:span text:style-name="T20">para purga de la </text:span></text:p></draw:text-box></draw:frame><draw:frame draw:style-name="gr30" draw:text-style-name="P25" svg:width="0.6051in" svg:height="0.2248in" svg:x="4.3508in" svg:y="9.3862in"><draw:text-box><text:p text:style-name="P24"><text:span text:style-name="T20">bomba</text:span></text:p></draw:text-box></draw:frame><draw:frame draw:style-name="gr31" draw:text-style-name="P25" svg:width="1.6476in" svg:height="0.2248in" svg:x="3.4453in" svg:y="10.878in"><draw:text-box><text:p text:style-name="P24"><text:span text:style-name="T20">Válvula antiretorno</text:span></text:p></draw:text-box></draw:frame><draw:frame draw:style-name="gr32" draw:text-style-name="P25" svg:width="1.4177in" svg:height="0.2248in" svg:x="4.7051in" svg:y="6.5862in"><draw:text-box><text:p text:style-name="P24"><text:span text:style-name="T20">Manguera D 16 </text:span></text:p></draw:text-box></draw:frame><draw:frame draw:style-name="gr33" draw:text-style-name="P25" svg:width="1.6268in" svg:height="0.2252in" svg:x="4.7051in" svg:y="6.8055in"><draw:text-box><text:p text:style-name="P24"><text:span text:style-name="T20">mm, longitud 20 m</text:span></text:p></draw:text-box></draw:frame><draw:frame draw:style-name="gr32" draw:text-style-name="P25" svg:width="1.4177in" svg:height="0.2248in" svg:x="1.8701in" svg:y="6.0752in"><draw:text-box><text:p text:style-name="P24"><text:span text:style-name="T20">Manguera D 16 </text:span></text:p></draw:text-box></draw:frame><draw:line draw:style-name="gr34" draw:text-style-name="P23" svg:x1="4.489in" svg:y1="4.922in" svg:x2="4.489in" svg:y2="5.237in"><text:p/></draw:line><draw:frame draw:style-name="gr35" draw:text-style-name="P25" svg:width="1.5114in" svg:height="0.2252in" svg:x="1.8701in" svg:y="6.2929in"><draw:text-box><text:p text:style-name="P24"><text:span text:style-name="T20">mm, longitud 3 m</text:span></text:p></draw:text-box></draw:frame><draw:frame draw:style-name="gr36" draw:text-style-name="P25" svg:width="0.8343in" svg:height="0.2252in" svg:x="0.6898in" svg:y="0.7201in"><draw:text-box><text:p text:style-name="P24"><text:span text:style-name="T20">Taller frío</text:span></text:p></draw:text-box></draw:frame><draw:line draw:style-name="gr37" draw:text-style-name="P23" svg:x1="3.3874in" svg:y1="5.7484in" svg:x2="3.7024in" svg:y2="5.7484in"><text:p/></draw:line><draw:frame draw:style-name="gr38" draw:text-style-name="P25" svg:width="0.3697in" svg:height="0.2252in" svg:x="4.587in" svg:y="4.7764in"><draw:text-box><text:p text:style-name="P24"><text:span text:style-name="T20">T6</text:span></text:p></draw:text-box></draw:frame><draw:frame draw:style-name="gr39" draw:text-style-name="P25" svg:width="0.3705in" svg:height="0.2252in" svg:x="3.0118in" svg:y="5.6417in"><draw:text-box><text:p text:style-name="P24"><text:span text:style-name="T20">T5</text:span></text:p></draw:text-box></draw:frame><draw:line draw:style-name="gr40" draw:text-style-name="P23" svg:x1="3.3874in" svg:y1="3.8193in" svg:x2="3.7024in" svg:y2="3.8193in"><text:p/></draw:line><draw:line draw:style-name="gr41" draw:text-style-name="P23" svg:x1="4.0949in" svg:y1="3.8193in" svg:x2="4.4098in" svg:y2="3.8193in"><text:p/></draw:line><draw:polygon draw:style-name="gr21" draw:text-style-name="P29" svg:width="0.748in" svg:height="0.5913in" svg:x="7.0472in" svg:y="4.3701in" svg:viewBox="0 0 1901 1503" draw:points="0,0 1901,0 1427,1503 477,1503"><text:p/></draw:polygon><draw:frame draw:style-name="gr42" draw:text-style-name="P25" svg:width="0.3587in" svg:height="0.2252in" svg:x="4.587in" svg:y="3.7126in"><draw:text-box><text:p text:style-name="P24"><text:span text:style-name="T20">T3</text:span></text:p></draw:text-box></draw:frame><draw:frame draw:style-name="gr2" draw:text-style-name="P23" svg:width="1.6969in" svg:height="1.3114in" svg:x="2.9827in" svg:y="0.9543in"><draw:image xlink:href="Pictures/10000000000000A30000007E8E84551B.jpg" xlink:type="simple" xlink:show="embed" xlink:actuate="onLoad" draw:mime-type="image/jpeg"><text:p/></draw:image></draw:frame><draw:frame draw:style-name="gr42" draw:text-style-name="P25" svg:width="0.3587in" svg:height="0.2252in" svg:x="2.8551in" svg:y="3.7126in"><draw:text-box><text:p text:style-name="P24"><text:span text:style-name="T20">T2</text:span></text:p></draw:text-box></draw:frame><draw:line draw:style-name="gr22" draw:text-style-name="P23" svg:x1="2.9732in" svg:y1="3.4055in" svg:x2="3.7209in" svg:y2="3.4055in"><text:p/></draw:line><draw:line draw:style-name="gr22" draw:text-style-name="P23" svg:x1="2.9925in" svg:y1="3.3866in" svg:x2="2.9925in" svg:y2="1.9693in"><text:p/></draw:line><draw:line draw:style-name="gr22" draw:text-style-name="P23" svg:x1="4.6465in" svg:y1="2.0079in" svg:x2="7.4815in" svg:y2="2.0079in"><text:p/></draw:line><draw:line draw:style-name="gr22" draw:text-style-name="P23" svg:x1="7.4819in" svg:y1="2.0079in" svg:x2="7.4819in" svg:y2="2.6311in"><text:p/></draw:line><draw:polygon draw:style-name="gr23" draw:text-style-name="P30" svg:width="0.1969in" svg:height="0.2957in" svg:x="7.3823in" svg:y="2.6181in" svg:viewBox="0 0 501 752" draw:points="252,752 501,0 0,0"><text:p/></draw:polygon><draw:line draw:style-name="gr22" draw:text-style-name="P23" svg:x1="4.2618in" svg:y1="10.1772in" svg:x2="4.2618in" svg:y2="7.126in"><text:p/></draw:line><draw:line draw:style-name="gr22" draw:text-style-name="P23" svg:x1="4.1346in" svg:y1="7.126in" svg:x2="4.2528in" svg:y2="7.126in"><text:p/></draw:line><draw:frame draw:style-name="gr43" draw:text-style-name="P26" svg:width="0.5996in" svg:height="0.2894in" svg:x="7.1244in" svg:y="4.5272in"><draw:text-box><text:p text:style-name="P24"><text:span text:style-name="T21">Cubo</text:span></text:p></draw:text-box></draw:frame><draw:frame draw:style-name="gr44" draw:text-style-name="P25" svg:width="0.7307in" svg:height="0.2252in" svg:x="3.4453in" svg:y="0.8in"><draw:text-box><text:p text:style-name="P24"><text:span text:style-name="T20">Fan Coil</text:span></text:p></draw:text-box></draw:frame><draw:frame draw:style-name="gr2" draw:text-style-name="P23" svg:width="1.1803in" svg:height="1.2713in" svg:x="6.7461in" svg:y="2.9744in"><draw:image xlink:href="Pictures/10000000000000B1000000BEB4AC76B6.jpg" xlink:type="simple" xlink:show="embed" xlink:actuate="onLoad" draw:mime-type="image/jpeg"><text:p/></draw:image></draw:frame><draw:frame draw:style-name="gr45" draw:text-style-name="P25" svg:width="1.8969in" svg:height="0.2252in" svg:x="2.226in" svg:y="9.6965in"><draw:text-box><text:p text:style-name="P24"><text:span text:style-name="T20">Tubo PE 25 mm (1”), </text:span></text:p></draw:text-box></draw:frame><draw:frame draw:style-name="gr46" draw:text-style-name="P25" svg:width="1.1886in" svg:height="0.2252in" svg:x="2.226in" svg:y="9.9154in"><draw:text-box><text:p text:style-name="P24"><text:span text:style-name="T20">longitud 10 m</text:span></text:p></draw:text-box></draw:frame><draw:frame draw:style-name="gr47" draw:text-style-name="P25" svg:width="1.126in" svg:height="0.2252in" svg:x="2.2646in" svg:y="7.5701in"><draw:text-box><text:p text:style-name="P24"><text:span text:style-name="T20">Bomba Espa</text:span></text:p></draw:text-box></draw:frame><draw:polygon draw:style-name="gr48" draw:text-style-name="P23" svg:width="7.4409in" svg:height="7.402in" svg:x="0.5516in" svg:y="0.6299in" svg:viewBox="0 0 18901 18802" draw:points="9451,18802 0,18802 0,0 18901,0 18901,18802"><text:p/></draw:polygon><draw:frame draw:style-name="gr49" draw:text-style-name="P25" svg:width="0.678in" svg:height="0.2252in" svg:x="5.5327in" svg:y="3.2402in"><draw:text-box><text:p text:style-name="P24"><text:span text:style-name="T20">Bomba </text:span></text:p></draw:text-box></draw:frame><draw:polygon draw:style-name="gr48" draw:text-style-name="P23" svg:width="7.4409in" svg:height="2.5988in" svg:x="0.5516in" svg:y="8.8193in" svg:viewBox="0 0 18901 6602" draw:points="9451,6602 0,6602 0,0 18901,0 18901,6602"><text:p/></draw:polygon><draw:path draw:style-name="gr22" draw:text-style-name="P23" svg:width="3.7496in" svg:height="2.2602in" svg:x="4.1055in" svg:y="1.1933in" svg:viewBox="0 0 9525 5742" svg:d="M9382 5548c75-275 185-562 127-847-55-275-92-546-127-822-37-268-101-523-78-796 29-338-289-620-231-951 46-261 78-514 104-771 26-271 8-530-52-822-69-324-318-500-592-514-283-15-566-22-848-25-280-2-566 5-846 1-332-7-641 101-976 76-303-23-603 50-900 103-289 51-560 76-849 77-304 1-587 38-847 154-266 118-513 197-770 334-300 158-402 480-361 770 37 280-12 568 26 848 40 302-87 560-127 848-43 281-150 559-312 796-171 254-445 456-768 514-283 51-531 256-669 539-127 259-231 442-286 682"><text:p/></draw:path><draw:polygon draw:style-name="gr23" draw:text-style-name="P30" svg:width="0.1957in" svg:height="0.3047in" svg:x="4.011in" svg:y="3.4272in" svg:viewBox="0 0 498 775" draw:points="168,775 498,55 0,0"><text:p/></draw:polygon><draw:frame draw:style-name="gr50" draw:text-style-name="P25" svg:width="0.9598in" svg:height="0.2248in" svg:x="5.5327in" svg:y="3.4598in"><draw:text-box><text:p text:style-name="P24"><text:span text:style-name="T20">sumergible</text:span></text:p></draw:text-box></draw:frame><draw:frame draw:style-name="gr51" draw:text-style-name="P25" svg:width="0.6362in" svg:height="0.2252in" svg:x="0.6898in" svg:y="8.8701in"><draw:text-box><text:p text:style-name="P24"><text:span text:style-name="T20">Piscina</text:span></text:p></draw:text-box></draw:frame><draw:line draw:style-name="gr37" draw:text-style-name="P23" svg:x1="4.2535in" svg:y1="7.5602in" svg:x2="4.5685in" svg:y2="7.5602in"><text:p/></draw:line><draw:frame draw:style-name="gr38" draw:text-style-name="P25" svg:width="0.3697in" svg:height="0.2252in" svg:x="4.6661in" svg:y="7.4138in"><draw:text-box><text:p text:style-name="P24"><text:span text:style-name="T20">T4</text:span></text:p></draw:text-box></draw:frame></draw:g></text:p>
      <text:p text:style-name="P2"/>
      <text:p text:style-name="P2"/>
      <text:p text:style-name="P3"><draw:g text:anchor-type="paragraph" draw:z-index="10" draw:name="Group object 3" draw:style-name="gr1"><draw:frame draw:style-name="gr2" draw:text-style-name="P23" svg:width="0.9043in" svg:height="0.9043in" svg:x="0.078in" svg:y="0in"><draw:image xlink:href="Pictures/10000000000000880000008845508CCF.jpg" xlink:type="simple" xlink:show="embed" xlink:actuate="onLoad" draw:mime-type="image/jpeg"><text:p/></draw:image></draw:frame><draw:frame draw:style-name="gr3" draw:text-style-name="P25" svg:width="1.3449in" svg:height="0.2252in" svg:x="1.1598in" svg:y="0.2654in"><draw:text-box><text:p text:style-name="P24"><text:span text:style-name="T20">Adapt</text:span><text:span text:style-name="T20">ador </text:span><text:span text:style-name="T20">grifo</text:span></text:p></draw:text-box></draw:frame><draw:frame draw:style-name="gr4" draw:text-style-name="P25" svg:width="5.428in" svg:height="0.2252in" svg:x="1.1598in" svg:y="0.7016in"><draw:text-box><text:p text:style-name="P24"><text:span text:style-name="T20">https://</text:span><text:span text:style-name="T20">www.ob</text:span><text:span text:style-name="T20">ramat.e</text:span><text:span text:style-name="T20">s/</text:span><text:span text:style-name="T20">adapta-</text:span><text:span text:style-name="T20">grifo-1-</text:span><text:span text:style-name="T20">2-3-4-1-</text:span><text:span text:style-name="T20">107664</text:span><text:span text:style-name="T20">13.html</text:span></text:p></draw:text-box></draw:frame><draw:frame draw:style-name="gr5" draw:text-style-name="P25" svg:width="3.0114in" svg:height="0.2252in" svg:x="1.1598in" svg:y="1.0917in"><draw:text-box><text:p text:style-name="P24"><text:span text:style-name="T20">Conec</text:span><text:span text:style-name="T20">tor </text:span><text:span text:style-name="T20">rápido </text:span><text:span text:style-name="T20">mang</text:span><text:span text:style-name="T20">uera </text:span><text:span text:style-name="T20">15 </text:span><text:span text:style-name="T20">mm</text:span></text:p></draw:text-box></draw:frame><draw:frame draw:style-name="gr2" draw:text-style-name="P23" svg:width="0.9051in" svg:height="0.9051in" svg:x="0.0516in" svg:y="0.9346in"><draw:image xlink:href="Pictures/10000000000000880000008873DE6DD7.jpg" xlink:type="simple" xlink:show="embed" xlink:actuate="onLoad" draw:mime-type="image/jpeg"><text:p/></draw:image></draw:frame><draw:frame draw:style-name="gr6" draw:text-style-name="P25" svg:width="5.6157in" svg:height="0.2252in" svg:x="1.1598in" svg:y="1.3098in"><draw:text-box><text:p text:style-name="P24"><text:span text:style-name="T20">htt</text:span><text:span text:style-name="T20">ps</text:span><text:span text:style-name="T20">://</text:span><text:span text:style-name="T20">w</text:span><text:span text:style-name="T20">w</text:span><text:span text:style-name="T20">w.</text:span><text:span text:style-name="T20">ob</text:span><text:span text:style-name="T20">ra</text:span><text:span text:style-name="T20">m</text:span><text:span text:style-name="T20">at.</text:span><text:span text:style-name="T20">es</text:span><text:span text:style-name="T20">/</text:span><text:span text:style-name="T20">co</text:span><text:span text:style-name="T20">ne</text:span><text:span text:style-name="T20">ct</text:span><text:span text:style-name="T20">or</text:span><text:span text:style-name="T20">-</text:span><text:span text:style-name="T20">au</text:span><text:span text:style-name="T20">to</text:span><text:span text:style-name="T20">m</text:span><text:span text:style-name="T20">ati</text:span><text:span text:style-name="T20">co</text:span><text:span text:style-name="T20">-</text:span><text:span text:style-name="T20">m</text:span><text:span text:style-name="T20">an</text:span><text:span text:style-name="T20">gu</text:span><text:span text:style-name="T20">er</text:span><text:span text:style-name="T20">a-</text:span><text:span text:style-name="T20">15</text:span><text:span text:style-name="T20">-</text:span><text:span text:style-name="T20">m</text:span><text:span text:style-name="T20">m-</text:span></text:p></draw:text-box></draw:frame><draw:frame draw:style-name="gr7" draw:text-style-name="P25" svg:width="1.3031in" svg:height="0.2252in" svg:x="1.1598in" svg:y="1.5299in"><draw:text-box><text:p text:style-name="P24"><text:span text:style-name="T20">10</text:span><text:span text:style-name="T20">76</text:span><text:span text:style-name="T20">60</text:span><text:span text:style-name="T20">35</text:span><text:span text:style-name="T20">.ht</text:span><text:span text:style-name="T20">ml</text:span></text:p></draw:text-box></draw:frame><draw:frame draw:style-name="gr2" draw:text-style-name="P23" svg:width="0.9051in" svg:height="0.9051in" svg:x="0.0256in" svg:y="2.6547in"><draw:image xlink:href="Pictures/1000000000000088000000880419C16A.jpg" xlink:type="simple" xlink:show="embed" xlink:actuate="onLoad" draw:mime-type="image/jpeg"><text:p/></draw:image></draw:frame><draw:frame draw:style-name="gr8" draw:text-style-name="P25" svg:width="1.7925in" svg:height="0.2252in" svg:x="1.1598in" svg:y="2.9417in"><draw:text-box><text:p text:style-name="P24"><text:span text:style-name="T20">Manguit</text:span><text:span text:style-name="T20">o 25 </text:span><text:span text:style-name="T20">mm PE</text:span></text:p></draw:text-box></draw:frame><draw:frame draw:style-name="gr9" draw:text-style-name="P25" svg:width="5.6988in" svg:height="0.2252in" svg:x="1.1598in" svg:y="3.1598in"><draw:text-box><text:p text:style-name="P24"><text:span text:style-name="T20">https://www.obramat.es/enlace-recto-o25mmx3-4-10442054.html</text:span></text:p></draw:text-box></draw:frame><draw:frame draw:style-name="gr10" draw:text-style-name="P25" svg:width="3.0012in" svg:height="0.2252in" svg:x="1.1598in" svg:y="3.6902in"><draw:text-box><text:p text:style-name="P24"><text:span text:style-name="T20">T de PE 25 mm con toma 3/4” H</text:span></text:p></draw:text-box></draw:frame><draw:frame draw:style-name="gr11" draw:text-style-name="P25" svg:width="5.2925in" svg:height="0.448in" svg:x="1.1598in" svg:y="3.9083in"><draw:text-box><text:p text:style-name="P24"><text:span text:style-name="T20"><text:a xlink:href="https://www.obramat.es/productos/te-mixta-25mmx3-4-pe" xlink:type="simple">https://www.obramat.es/productos/te-mixta-25mmx3-4-pe</text:a></text:span></text:p><text:p text:style-name="P24"><text:span text:style-name="T20">-hembra-hembra-10442194.html</text:span></text:p></draw:text-box></draw:frame><draw:frame draw:style-name="gr2" draw:text-style-name="P23" svg:width="0.9051in" svg:height="0.9051in" svg:x="0.0256in" svg:y="4.3445in"><draw:image xlink:href="Pictures/1000000000000088000000886E57FFE6.jpg" xlink:type="simple" xlink:show="embed" xlink:actuate="onLoad" draw:mime-type="image/jpeg"><text:p/></draw:image></draw:frame><draw:frame draw:style-name="gr12" draw:text-style-name="P25" svg:width="1.5114in" svg:height="0.2248in" svg:x="1.1598in" svg:y="4.5957in"><draw:text-box><text:p text:style-name="P24"><text:span text:style-name="T20">PE 25 mm 3/4” H</text:span></text:p></draw:text-box></draw:frame><draw:frame draw:style-name="gr13" draw:text-style-name="P25" svg:width="5.928in" svg:height="0.2252in" svg:x="1.1598in" svg:y="4.8138in"><draw:text-box><text:p text:style-name="P24"><text:span text:style-name="T20">https://www.obramat.es/enlace-o25mmx3-4-hembra-10442313.html</text:span></text:p></draw:text-box></draw:frame><draw:frame draw:style-name="gr14" draw:text-style-name="P25" svg:width="1.3657in" svg:height="0.2252in" svg:x="1.1598in" svg:y="5.5516in"><draw:text-box><text:p text:style-name="P24"><text:span text:style-name="T20">PE 25 mm 3/4” </text:span></text:p></draw:text-box></draw:frame><draw:frame draw:style-name="gr2" draw:text-style-name="P23" svg:width="0.9051in" svg:height="0.9043in" svg:x="0.0256in" svg:y="5.2898in"><draw:image xlink:href="Pictures/100000000000008800000088EA5BFAD5.jpg" xlink:type="simple" xlink:show="embed" xlink:actuate="onLoad" draw:mime-type="image/jpeg"><text:p/></draw:image></draw:frame><draw:frame draw:style-name="gr15" draw:text-style-name="P26" svg:width="0.2504in" svg:height="0.2894in" svg:x="2.5161in" svg:y="5.5008in"><draw:text-box><text:p text:style-name="P24"><text:span text:style-name="T21">H</text:span></text:p></draw:text-box></draw:frame><draw:frame draw:style-name="gr16" draw:text-style-name="P25" svg:width="5.8449in" svg:height="0.2252in" svg:x="1.1598in" svg:y="5.7807in"><draw:text-box><text:p text:style-name="P24"><text:span text:style-name="T20">https://www.obramat.es/enlace-o25mmx3-4-macho-10442285.html</text:span></text:p></draw:text-box></draw:frame><draw:frame draw:style-name="gr5" draw:text-style-name="P25" svg:width="3.0114in" svg:height="0.2252in" svg:x="1.1598in" svg:y="1.998in"><draw:text-box><text:p text:style-name="P24"><text:span text:style-name="T20">Conector rápido manguera 19 mm</text:span></text:p></draw:text-box></draw:frame><draw:frame draw:style-name="gr2" draw:text-style-name="P23" svg:width="0.9051in" svg:height="0.9051in" svg:x="0.0516in" svg:y="1.8402in"><draw:image xlink:href="Pictures/10000000000000880000008873DE6DD7.jpg" xlink:type="simple" xlink:show="embed" xlink:actuate="onLoad" draw:mime-type="image/jpeg"><text:p/></draw:image></draw:frame><draw:frame draw:style-name="gr2" draw:text-style-name="P23" svg:width="1.0067in" svg:height="0.4496in" svg:x="0.0543in" svg:y="6.3827in"><draw:image xlink:href="Pictures/1000000100000096000000435BF73389.png" xlink:type="simple" xlink:show="embed" xlink:actuate="onLoad" draw:mime-type="image/png"><text:p/></draw:image></draw:frame><draw:frame draw:style-name="gr6" draw:text-style-name="P25" svg:width="5.6157in" svg:height="0.2252in" svg:x="1.1598in" svg:y="2.2154in"><draw:text-box><text:p text:style-name="P24"><text:span text:style-name="T20">https://www.obramat.es/conector-automatico-manguera-15-mm-</text:span></text:p></draw:text-box></draw:frame><draw:frame draw:style-name="gr7" draw:text-style-name="P25" svg:width="1.3031in" svg:height="0.2252in" svg:x="1.1598in" svg:y="2.4335in"><draw:text-box><text:p text:style-name="P24"><text:span text:style-name="T20">10766035.html</text:span></text:p></draw:text-box></draw:frame><draw:frame draw:style-name="gr17" draw:text-style-name="P25" svg:width="2.7925in" svg:height="0.2248in" svg:x="1.1598in" svg:y="6.2484in"><draw:text-box><text:p text:style-name="P24"><text:span text:style-name="T20">Vaina de inmersión 1/2”M, 5 cm</text:span></text:p></draw:text-box></draw:frame><draw:frame draw:style-name="gr18" draw:text-style-name="P25" svg:width="2.7303in" svg:height="0.2252in" svg:x="1.1598in" svg:y="6.4681in"><draw:text-box><text:p text:style-name="P24"><text:span text:style-name="T20">Salvador Escoda ref. CO02110</text:span></text:p></draw:text-box></draw:frame><draw:frame draw:style-name="gr19" draw:text-style-name="P27" svg:width="1.0004in" svg:height="1.0004in" svg:x="0in" svg:y="3.4709in"><draw:image xlink:href="Pictures/100000000000028A0000028AD7ADD7C0.png" xlink:type="simple" xlink:show="embed" xlink:actuate="onLoad" draw:mime-type="image/png"><text:p/></draw:image></draw:frame></draw:g></text:p>
      <text:p text:style-name="P20"/>
      <text:p text:style-name="P2"/>
      <text:p text:style-name="P2"><draw:g text:anchor-type="paragraph" draw:z-index="6" draw:name="Group object 1" draw:style-name="gr1"><draw:frame draw:style-name="gr19" draw:text-style-name="P27" svg:width="10.9079in" svg:height="6.3516in" svg:x="0.0008in" svg:y="0.6528in"><draw:image xlink:href="Pictures/10000000000002C70000019E6C6E1F78.png" xlink:type="simple" xlink:show="embed" xlink:actuate="onLoad" draw:mime-type="image/png"><text:p/></draw:image></draw:frame><draw:frame draw:style-name="gr52" draw:text-style-name="P32" svg:width="0.7504in" svg:height="0.2594in" svg:x="0.378in" svg:y="0.0965in"><draw:text-box><text:p text:style-name="P31"><text:span text:style-name="T22">27/05/26</text:span></text:p></draw:text-box></draw:frame><draw:frame draw:style-name="gr53" draw:text-style-name="P32" svg:width="0.9996in" svg:height="0.3134in" svg:x="7.5437in" svg:y="7.0654in"><draw:text-box><text:p text:style-name="P31"><text:span text:style-name="T22">Time in min.</text:span></text:p></draw:text-box></draw:frame><draw:frame draw:style-name="gr54" draw:text-style-name="P32" svg:width="1.3539in" svg:height="0.4094in" svg:x="0.0244in" svg:y="0.3331in"><draw:text-box><text:p text:style-name="P31"><text:span text:style-name="T22">Temperature in ºC</text:span></text:p></draw:text-box></draw:frame><draw:frame draw:style-name="gr53" draw:text-style-name="P32" svg:width="0.2823in" svg:height="0.3134in" svg:x="0.2209in" svg:y="7.0654in"><draw:text-box><text:p text:style-name="P31"><text:span text:style-name="T22">0</text:span></text:p></draw:text-box></draw:frame><draw:frame draw:style-name="gr54" draw:text-style-name="P32" svg:width="0.3598in" svg:height="0.4094in" svg:x="1.128in" svg:y="7.0654in"><draw:text-box><text:p text:style-name="P31"><text:span text:style-name="T22">10</text:span></text:p></draw:text-box></draw:frame><draw:frame draw:style-name="gr54" draw:text-style-name="P32" svg:width="0.3594in" svg:height="0.4094in" svg:x="2.1524in" svg:y="7.0657in"><draw:text-box><text:p text:style-name="P31"><text:span text:style-name="T22">20</text:span></text:p></draw:text-box></draw:frame><draw:frame draw:style-name="gr54" draw:text-style-name="P32" svg:width="0.3598in" svg:height="0.4094in" svg:x="3.0972in" svg:y="7.0657in"><draw:text-box><text:p text:style-name="P31"><text:span text:style-name="T22">30</text:span></text:p></draw:text-box></draw:frame><draw:frame draw:style-name="gr54" draw:text-style-name="P32" svg:width="0.3594in" svg:height="0.4094in" svg:x="4.1606in" svg:y="7.0657in"><draw:text-box><text:p text:style-name="P31"><text:span text:style-name="T22">40</text:span></text:p></draw:text-box></draw:frame><draw:frame draw:style-name="gr54" draw:text-style-name="P32" svg:width="0.3598in" svg:height="0.4094in" svg:x="5.1051in" svg:y="7.0657in"><draw:text-box><text:p text:style-name="P31"><text:span text:style-name="T22">50</text:span></text:p></draw:text-box></draw:frame><draw:frame draw:style-name="gr54" draw:text-style-name="P32" svg:width="0.3594in" svg:height="0.4094in" svg:x="6.0898in" svg:y="7.0657in"><draw:text-box><text:p text:style-name="P31"><text:span text:style-name="T22">60</text:span></text:p></draw:text-box></draw:frame><draw:frame draw:style-name="gr54" draw:text-style-name="P32" svg:width="0.3594in" svg:height="0.4094in" svg:x="7.0736in" svg:y="7.0657in"><draw:text-box><text:p text:style-name="P31"><text:span text:style-name="T22">70</text:span></text:p></draw:text-box></draw:frame><draw:line draw:style-name="gr55" draw:text-style-name="P27" svg:x1="6.2764in" svg:y1="1.2827in" svg:x2="6.2764in" svg:y2="6.6594in"><text:p/></draw:line><draw:line draw:style-name="gr55" draw:text-style-name="P27" svg:x1="5.4886in" svg:y1="1.2843in" svg:x2="5.4886in" svg:y2="6.661in"><text:p/></draw:line><draw:line draw:style-name="gr55" draw:text-style-name="P27" svg:x1="5.0094in" svg:y1="5.2535in" svg:x2="5.0094in" svg:y2="6.661in"><text:p/></draw:line><draw:line draw:style-name="gr55" draw:text-style-name="P27" svg:x1="4.5831in" svg:y1="1.285in" svg:x2="4.5831in" svg:y2="6.6618in"><text:p/></draw:line><draw:line draw:style-name="gr55" draw:text-style-name="P27" svg:x1="3.1264in" svg:y1="1.2866in" svg:x2="3.1264in" svg:y2="6.6634in"><text:p/></draw:line><draw:line draw:style-name="gr55" draw:text-style-name="P27" svg:x1="2.6933in" svg:y1="1.287in" svg:x2="2.6933in" svg:y2="6.6638in"><text:p/></draw:line><draw:line draw:style-name="gr55" draw:text-style-name="P27" svg:x1="4.4579in" svg:y1="5.2539in" svg:x2="4.4579in" svg:y2="6.6614in"><text:p/></draw:line><draw:line draw:style-name="gr55" draw:text-style-name="P27" svg:x1="4.1039in" svg:y1="5.2547in" svg:x2="4.1039in" svg:y2="6.6622in"><text:p/></draw:line><draw:line draw:style-name="gr55" draw:text-style-name="P27" svg:x1="3.8287in" svg:y1="5.2551in" svg:x2="3.8287in" svg:y2="6.6626in"><text:p/></draw:line><draw:line draw:style-name="gr55" draw:text-style-name="P27" svg:x1="5.8362in" svg:y1="5.2539in" svg:x2="5.8362in" svg:y2="6.6614in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/>
      <text:p text:style-name="P9">Compresor </text:p>
      <text:p text:style-name="P9">Fabricante: LG – Modelo: NP362PBA</text:p>
      <text:p text:style-name="P9">1 HP – LRA52</text:p>
      <text:p text:style-name="P9"/>
      <text:p text:style-name="P9">Presostato</text:p>
      <text:p text:style-name="P9">LPL1630</text:p>
      <text:p text:style-name="P9">Abre a 1,1 bar, cierra a 2,2 bar.</text:p>
      <text:p text:style-name="P9"/>
      <text:p text:style-name="P9"><draw:frame draw:style-name="fr1" draw:name="Image7" text:anchor-type="char" svg:width="3in" svg:height="4.0098in" draw:z-index="11"><draw:image xlink:href="Pictures/1000000000000BB000000FA0394E38F7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stroke-dash26" draw:style="rect" draw:dots1="1" draw:dots1-length="0.0063in" draw:distance="0.006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2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6T12:05:19.911052342</meta:creation-date>
    <dc:date>2026-06-30T09:21:01.066197888</dc:date>
    <meta:editing-duration>PT1H6M30S</meta:editing-duration>
    <meta:editing-cycles>14</meta:editing-cycles>
    <meta:generator>LibreOffice/24.2.7.2$Linux_X86_64 LibreOffice_project/420$Build-2</meta:generator>
    <meta:print-date>2026-06-30T09:21:20.492117546</meta:print-date>
    <meta:printed-by>PDF files</meta:printed-by>
    <meta:document-statistic meta:table-count="0" meta:image-count="8" meta:object-count="0" meta:page-count="11" meta:paragraph-count="35" meta:word-count="447" meta:character-count="2619" meta:non-whitespace-character-count="2199"/>
  </office:meta>
</office:document-meta>
</file>